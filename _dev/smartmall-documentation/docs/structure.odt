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 fo:padding="0in" fo:border="none" style:shadow="none"/>
    </style:style>
    <style:style style:name="P2" style:family="paragraph" style:parent-style-name="Heading_20_2">
      <style:paragraph-properties fo:margin-left="0in" fo:margin-right="0in" fo:text-indent="0in" style:auto-text-indent="false" fo:padding="0in" fo:border="none" style:shadow="none"/>
    </style:style>
    <style:style style:name="P3" style:family="paragraph" style:parent-style-name="Heading_20_3">
      <style:paragraph-properties fo:margin-left="0in" fo:margin-right="0in" fo:text-indent="0in" style:auto-text-indent="false" fo:padding="0in" fo:border="none" style:shadow="none"/>
    </style:style>
    <style:style style:name="P4" style:family="paragraph" style:parent-style-name="List_20_Paragraph" style:list-style-name="WWNum1">
      <style:paragraph-properties fo:margin-left="0.4925in" fo:margin-right="0in" fo:text-indent="-0.25in" style:auto-text-indent="false" fo:padding="0in" fo:border="none" style:shadow="none"/>
    </style:style>
    <style:style style:name="P5" style:family="paragraph" style:parent-style-name="List_20_Paragraph" style:list-style-name="WWNum1">
      <style:paragraph-properties fo:margin-left="0.4925in" fo:margin-right="0in" fo:margin-top="0in" fo:margin-bottom="0in" style:contextual-spacing="true" fo:text-indent="-0.25in" style:auto-text-indent="false" fo:padding="0in" fo:border="none" style:shadow="none"/>
    </style:style>
    <style:style style:name="P6" style:family="paragraph" style:parent-style-name="List_20_Paragraph" style:list-style-name="WWNum1">
      <style:paragraph-properties fo:margin-left="0.4925in" fo:margin-right="0in" fo:margin-top="0in" fo:margin-bottom="0.139in" style:contextual-spacing="true" fo:text-indent="-0.25in" style:auto-text-indent="false" fo:padding="0in" fo:border="none" style:shadow="none"/>
    </style:style>
    <style:style style:name="P7" style:family="paragraph" style:parent-style-name="List_20_Paragraph" style:list-style-name="WWNum2">
      <style:paragraph-properties fo:margin-left="0.4925in" fo:margin-right="0in" fo:margin-top="0in" fo:margin-bottom="0in" style:contextual-spacing="true" fo:text-indent="-0.25in" style:auto-text-indent="false" fo:padding="0in" fo:border="none" style:shadow="none"/>
    </style:style>
    <style:style style:name="P8" style:family="paragraph" style:parent-style-name="List_20_Paragraph" style:list-style-name="WWNum2">
      <style:paragraph-properties fo:margin-left="0.4925in" fo:margin-right="0in" fo:margin-top="0in" fo:margin-bottom="0.139in" style:contextual-spacing="true" fo:text-indent="-0.25in" style:auto-text-indent="false" fo:padding="0in" fo:border="none" style:shadow="none"/>
    </style:style>
    <style:style style:name="P9" style:family="paragraph" style:parent-style-name="List_20_Paragraph" style:list-style-name="WWNum3">
      <style:paragraph-properties fo:margin-left="0.4925in" fo:margin-right="0in" fo:margin-top="0in" fo:margin-bottom="0in" style:contextual-spacing="true" fo:text-indent="-0.25in" style:auto-text-indent="false" fo:padding="0in" fo:border="none" style:shadow="none"/>
    </style:style>
    <style:style style:name="P10" style:family="paragraph" style:parent-style-name="List_20_Paragraph" style:list-style-name="WWNum3">
      <style:paragraph-properties fo:margin-left="0.4925in" fo:margin-right="0in" fo:margin-top="0in" fo:margin-bottom="0.139in" style:contextual-spacing="true" fo:text-indent="-0.25in" style:auto-text-indent="false" fo:padding="0in" fo:border="none" style:shadow="none"/>
    </style:style>
    <style:style style:name="P11" style:family="paragraph" style:parent-style-name="Standard">
      <style:paragraph-properties fo:margin-left="0in" fo:margin-right="0in" fo:text-indent="0in" style:auto-text-indent="false" fo:padding="0in" fo:border="none" style:shadow="none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in" fo:margin-bottom="0in" style:contextual-spacing="false"/>
    </style:style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margin-top="0in" fo:margin-bottom="0in" style:contextual-spacing="false"/>
    </style:style>
    <style:style style:name="P20" style:family="paragraph" style:parent-style-name="Text_20_body" style:list-style-name="L5"/>
    <style:style style:name="P21" style:family="paragraph" style:parent-style-name="Text_20_body" style:list-style-name="L5">
      <style:paragraph-properties fo:margin-top="0in" fo:margin-bottom="0in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6">
      <style:paragraph-properties fo:margin-top="0in" fo:margin-bottom="0in" style:contextual-spacing="false"/>
    </style:style>
    <style:style style:name="P24" style:family="paragraph" style:parent-style-name="Text_20_body" style:list-style-name="L7"/>
    <style:style style:name="P25" style:family="paragraph" style:parent-style-name="Text_20_body" style:list-style-name="L7">
      <style:paragraph-properties fo:margin-top="0in" fo:margin-bottom="0in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8">
      <style:paragraph-properties fo:margin-top="0in" fo:margin-bottom="0in" style:contextual-spacing="false"/>
    </style:style>
    <style:style style:name="P28" style:family="paragraph" style:parent-style-name="Text_20_body" style:list-style-name="L9"/>
    <style:style style:name="P29" style:family="paragraph" style:parent-style-name="Text_20_body" style:list-style-name="L9">
      <style:paragraph-properties fo:margin-top="0in" fo:margin-bottom="0in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0">
      <style:paragraph-properties fo:margin-top="0in" fo:margin-bottom="0in" style:contextual-spacing="false"/>
    </style:style>
    <style:style style:name="P32" style:family="paragraph" style:parent-style-name="Text_20_body" style:list-style-name="L11"/>
    <style:style style:name="P33" style:family="paragraph" style:parent-style-name="Text_20_body" style:list-style-name="L11">
      <style:paragraph-properties fo:margin-top="0in" fo:margin-bottom="0in" style:contextual-spacing="false"/>
    </style:style>
    <style:style style:name="P34" style:family="paragraph" style:parent-style-name="Text_20_body" style:list-style-name="L12"/>
    <style:style style:name="P35" style:family="paragraph" style:parent-style-name="Text_20_body" style:list-style-name="L12">
      <style:paragraph-properties fo:margin-top="0in" fo:margin-bottom="0in" style:contextual-spacing="false"/>
    </style:style>
    <style:style style:name="P36" style:family="paragraph" style:parent-style-name="Text_20_body" style:list-style-name="L13"/>
    <style:style style:name="P37" style:family="paragraph" style:parent-style-name="Text_20_body" style:list-style-name="L13">
      <style:paragraph-properties fo:margin-top="0in" fo:margin-bottom="0in" style:contextual-spacing="false"/>
    </style:style>
    <style:style style:name="P38" style:family="paragraph" style:parent-style-name="Text_20_body" style:list-style-name="L14"/>
    <style:style style:name="P39" style:family="paragraph" style:parent-style-name="Text_20_body" style:list-style-name="L14">
      <style:paragraph-properties fo:margin-top="0in" fo:margin-bottom="0in" style:contextual-spacing="false"/>
    </style:style>
    <style:style style:name="P40" style:family="paragraph" style:parent-style-name="Text_20_body" style:list-style-name="L15"/>
    <style:style style:name="P41" style:family="paragraph" style:parent-style-name="Text_20_body" style:list-style-name="L15">
      <style:paragraph-properties fo:margin-top="0in" fo:margin-bottom="0in" style:contextual-spacing="false"/>
    </style:style>
    <style:style style:name="P42" style:family="paragraph" style:parent-style-name="Text_20_body" style:list-style-name="L16"/>
    <style:style style:name="P43" style:family="paragraph" style:parent-style-name="Text_20_body" style:list-style-name="L16">
      <style:paragraph-properties fo:margin-top="0in" fo:margin-bottom="0in" style:contextual-spacing="false"/>
    </style:style>
    <style:style style:name="P44" style:family="paragraph" style:parent-style-name="Text_20_body" style:list-style-name="L17"/>
    <style:style style:name="P45" style:family="paragraph" style:parent-style-name="Text_20_body" style:list-style-name="L17">
      <style:paragraph-properties fo:margin-top="0in" fo:margin-bottom="0in" style:contextual-spacing="false"/>
    </style:style>
    <style:style style:name="P46" style:family="paragraph" style:parent-style-name="Text_20_body" style:list-style-name="L18"/>
    <style:style style:name="P47" style:family="paragraph" style:parent-style-name="Text_20_body" style:list-style-name="L18">
      <style:paragraph-properties fo:margin-top="0in" fo:margin-bottom="0in" style:contextual-spacing="false"/>
    </style:style>
    <style:style style:name="P48" style:family="paragraph" style:parent-style-name="Text_20_body" style:list-style-name="L19"/>
    <style:style style:name="P49" style:family="paragraph" style:parent-style-name="Text_20_body" style:list-style-name="L19">
      <style:paragraph-properties fo:margin-top="0in" fo:margin-bottom="0in" style:contextual-spacing="false"/>
    </style:style>
    <style:style style:name="P50" style:family="paragraph" style:parent-style-name="Text_20_body" style:list-style-name="L20"/>
    <style:style style:name="P51" style:family="paragraph" style:parent-style-name="Text_20_body" style:list-style-name="L20">
      <style:paragraph-properties fo:margin-top="0in" fo:margin-bottom="0in" style:contextual-spacing="false"/>
    </style:style>
    <style:style style:name="P52" style:family="paragraph" style:parent-style-name="Text_20_body" style:list-style-name="L21"/>
    <style:style style:name="P53" style:family="paragraph" style:parent-style-name="Text_20_body" style:list-style-name="L21">
      <style:paragraph-properties fo:margin-top="0in" fo:margin-bottom="0in" style:contextual-spacing="false"/>
    </style:style>
    <style:style style:name="P54" style:family="paragraph" style:parent-style-name="Text_20_body" style:list-style-name="L22"/>
    <style:style style:name="P55" style:family="paragraph" style:parent-style-name="Text_20_body" style:list-style-name="L22">
      <style:paragraph-properties fo:margin-top="0in" fo:margin-bottom="0in" style:contextual-spacing="false"/>
    </style:style>
    <style:style style:name="P56" style:family="paragraph" style:parent-style-name="Text_20_body" style:list-style-name="L23"/>
    <style:style style:name="P57" style:family="paragraph" style:parent-style-name="Text_20_body" style:list-style-name="L23">
      <style:paragraph-properties fo:margin-top="0in" fo:margin-bottom="0in" style:contextual-spacing="false"/>
    </style:style>
    <style:style style:name="P58" style:family="paragraph" style:parent-style-name="Text_20_body" style:list-style-name="L24"/>
    <style:style style:name="P59" style:family="paragraph" style:parent-style-name="Text_20_body" style:list-style-name="L24">
      <style:paragraph-properties fo:margin-top="0in" fo:margin-bottom="0in" style:contextual-spacing="false"/>
    </style:style>
    <style:style style:name="P60" style:family="paragraph" style:parent-style-name="Text_20_body" style:list-style-name="L25"/>
    <style:style style:name="P61" style:family="paragraph" style:parent-style-name="Text_20_body" style:list-style-name="L25">
      <style:paragraph-properties fo:margin-top="0in" fo:margin-bottom="0in" style:contextual-spacing="false"/>
    </style:style>
    <style:style style:name="P62" style:family="paragraph" style:parent-style-name="Text_20_body" style:list-style-name="L26"/>
    <style:style style:name="P63" style:family="paragraph" style:parent-style-name="Text_20_body" style:list-style-name="L26">
      <style:paragraph-properties fo:margin-top="0in" fo:margin-bottom="0in" style:contextual-spacing="false"/>
    </style:style>
    <style:style style:name="P64" style:family="paragraph" style:parent-style-name="Text_20_body" style:list-style-name="L27"/>
    <style:style style:name="P65" style:family="paragraph" style:parent-style-name="Text_20_body" style:list-style-name="L27">
      <style:paragraph-properties fo:margin-top="0in" fo:margin-bottom="0in" style:contextual-spacing="false"/>
    </style:style>
    <style:style style:name="P66" style:family="paragraph" style:parent-style-name="Text_20_body" style:list-style-name="L28"/>
    <style:style style:name="P67" style:family="paragraph" style:parent-style-name="Text_20_body" style:list-style-name="L28">
      <style:paragraph-properties fo:margin-top="0in" fo:margin-bottom="0in" style:contextual-spacing="false"/>
    </style:style>
    <style:style style:name="P68" style:family="paragraph" style:parent-style-name="Text_20_body" style:list-style-name="L29"/>
    <style:style style:name="P69" style:family="paragraph" style:parent-style-name="Text_20_body" style:list-style-name="L29">
      <style:paragraph-properties fo:margin-top="0in" fo:margin-bottom="0in" style:contextual-spacing="false"/>
    </style:style>
    <style:style style:name="P70" style:family="paragraph" style:parent-style-name="Text_20_body" style:list-style-name="L30"/>
    <style:style style:name="P71" style:family="paragraph" style:parent-style-name="Text_20_body" style:list-style-name="L30">
      <style:paragraph-properties fo:margin-top="0in" fo:margin-bottom="0in" style:contextual-spacing="false"/>
    </style:style>
    <style:style style:name="P72" style:family="paragraph" style:parent-style-name="Text_20_body" style:list-style-name="L31"/>
    <style:style style:name="P73" style:family="paragraph" style:parent-style-name="Text_20_body" style:list-style-name="L31">
      <style:paragraph-properties fo:margin-top="0in" fo:margin-bottom="0in" style:contextual-spacing="false"/>
    </style:style>
    <style:style style:name="T1" style:family="text">
      <style:text-properties fo:color="#000000" loext:opacity="100%" style:font-name="Times New Roman" fo:font-size="24pt" fo:font-weight="bold" style:font-name-asian="Times New Roman1" style:font-size-asian="24pt" style:font-weight-asian="bold" style:font-name-complex="Times New Roman1"/>
    </style:style>
    <style:style style:name="T2" style:family="text"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/>
    </style:style>
    <style:style style:name="T3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4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/>
    </style:style>
    <style:style style:name="T6" style:family="text">
      <style:text-properties fo:color="#fafbfc" loext:opacity="100%" style:font-name="Arial" fo:font-size="10.5pt" style:text-underline-style="none" style:font-name-asian="Arial1" style:font-size-asian="10.5pt" style:font-name-complex="Arial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martMall E-Commerce Platform Documentation</text:span></text:h>
      <text:h text:style-name="P2" text:outline-level="2"><text:span text:style-name="T2">1. Introduction</text:span></text:h>
      <text:list text:style-name="WWNum1">
        <text:list-item>
          <text:p text:style-name="P5"><text:span text:style-name="T3">Overview of SmartMall</text:span></text:p>
        </text:list-item>
        <text:list-item>
          <text:p text:style-name="P5"><text:span text:style-name="T3">Purpose of the system</text:span></text:p>
        </text:list-item>
        <text:list-item>
          <text:p text:style-name="P6"><text:span text:style-name="T3">Project objectives</text:span></text:p>
        </text:list-item>
      </text:list>
      <text:h text:style-name="P2" text:outline-level="2"><text:span text:style-name="T2">2. Problem Statement</text:span></text:h>
      <text:p text:style-name="P11"><text:span text:style-name="T3">Explain the real-world problem:</text:span></text:p>
      <text:p text:style-name="P11"><text:span text:style-name="T3">Examples:</text:span></text:p>
      <text:list text:continue-numbering="true" text:style-name="WWNum1">
        <text:list-item>
          <text:p text:style-name="P5"><text:span text:style-name="T3">Local stores have limited online presence</text:span></text:p>
        </text:list-item>
        <text:list-item>
          <text:p text:style-name="P5"><text:span text:style-name="T3">Customers cannot easily compare products</text:span></text:p>
        </text:list-item>
        <text:list-item>
          <text:p text:style-name="P6"><text:span text:style-name="T3">Lack of centralized shopping platform</text:span></text:p>
        </text:list-item>
      </text:list>
      <text:h text:style-name="P2" text:outline-level="2"><text:span text:style-name="T2">3. Proposed Solution</text:span></text:h>
      <text:p text:style-name="P11"><text:span text:style-name="T3">Explain what SmartMall does:</text:span></text:p>
      <text:list text:continue-numbering="true" text:style-name="WWNum1">
        <text:list-item>
          <text:p text:style-name="P5"><text:span text:style-name="T3">Centralized e-commerce marketplace</text:span></text:p>
        </text:list-item>
        <text:list-item>
          <text:p text:style-name="P5"><text:span text:style-name="T3">Easy product browsing</text:span></text:p>
        </text:list-item>
        <text:list-item>
          <text:p text:style-name="P5"><text:span text:style-name="T3">Online ordering system</text:span></text:p>
        </text:list-item>
        <text:list-item>
          <text:p text:style-name="P6"><text:span text:style-name="T3">Admin management system</text:span></text:p>
        </text:list-item>
      </text:list>
      <text:h text:style-name="P2" text:outline-level="2"><text:span text:style-name="T2">4. Target Users</text:span></text:h>
      <text:p text:style-name="P11"><text:span text:style-name="T3">Who will use the platform:</text:span></text:p>
      <text:list text:continue-numbering="true" text:style-name="WWNum1">
        <text:list-item>
          <text:p text:style-name="P5"><text:span text:style-name="T3">Customers</text:span></text:p>
        </text:list-item>
        <text:list-item>
          <text:p text:style-name="P5"><text:span text:style-name="T3">Administrators</text:span></text:p>
        </text:list-item>
        <text:list-item>
          <text:p text:style-name="P6"><text:span text:style-name="T3">Future: Sellers / vendors</text:span></text:p>
        </text:list-item>
      </text:list>
      <text:h text:style-name="P2" text:outline-level="2"><text:span text:style-name="T2">5. System Features</text:span></text:h>
      <text:p text:style-name="P11"><text:span text:style-name="T3">Explain what the system provides.</text:span></text:p>
      <text:p text:style-name="P11"><text:span text:style-name="T3">Example:</text:span></text:p>
      <text:p text:style-name="P11"><text:span text:style-name="T3">Customer Features</text:span></text:p>
      <text:list text:continue-numbering="true" text:style-name="WWNum1">
        <text:list-item>
          <text:p text:style-name="P5"><text:soft-page-break/><text:span text:style-name="T3">Register and login</text:span></text:p>
        </text:list-item>
        <text:list-item>
          <text:p text:style-name="P5"><text:span text:style-name="T3">Browse products</text:span></text:p>
        </text:list-item>
        <text:list-item>
          <text:p text:style-name="P5"><text:span text:style-name="T3">Add to cart</text:span></text:p>
        </text:list-item>
        <text:list-item>
          <text:p text:style-name="P5"><text:span text:style-name="T3">Place orders</text:span></text:p>
        </text:list-item>
        <text:list-item>
          <text:p text:style-name="P6"><text:span text:style-name="T3">View order history</text:span></text:p>
        </text:list-item>
      </text:list>
      <text:p text:style-name="P11"><text:span text:style-name="T3">Admin Features</text:span></text:p>
      <text:list text:continue-numbering="true" text:style-name="WWNum1">
        <text:list-item>
          <text:p text:style-name="P5"><text:span text:style-name="T3">Manage products</text:span></text:p>
        </text:list-item>
        <text:list-item>
          <text:p text:style-name="P5"><text:span text:style-name="T3">Upload product images</text:span></text:p>
        </text:list-item>
        <text:list-item>
          <text:p text:style-name="P5"><text:span text:style-name="T3">View statistics</text:span></text:p>
        </text:list-item>
        <text:list-item>
          <text:p text:style-name="P6"><text:span text:style-name="T3">Manage orders</text:span></text:p>
        </text:list-item>
      </text:list>
      <text:h text:style-name="P2" text:outline-level="2"><text:span text:style-name="T2">6. System Architecture</text:span></text:h>
      <text:p text:style-name="P11"><text:span text:style-name="T3">Explain technical structure:</text:span></text:p>
      <text:p text:style-name="P11"><text:span text:style-name="T3">Frontend</text:span></text:p>
      <text:list text:continue-numbering="true" text:style-name="WWNum1">
        <text:list-item>
          <text:p text:style-name="P5"><text:span text:style-name="T3">HTML</text:span></text:p>
        </text:list-item>
        <text:list-item>
          <text:p text:style-name="P5"><text:span text:style-name="T3">CSS</text:span></text:p>
        </text:list-item>
        <text:list-item>
          <text:p text:style-name="P6"><text:span text:style-name="T3">JavaScript</text:span></text:p>
        </text:list-item>
      </text:list>
      <text:p text:style-name="P11"><text:span text:style-name="T3">Backend</text:span></text:p>
      <text:list text:continue-numbering="true" text:style-name="WWNum1">
        <text:list-item>
          <text:p text:style-name="P4"><text:span text:style-name="T3">PHP</text:span></text:p>
        </text:list-item>
      </text:list>
      <text:p text:style-name="P11"><text:span text:style-name="T3">Database</text:span></text:p>
      <text:list text:continue-numbering="true" text:style-name="WWNum1">
        <text:list-item>
          <text:p text:style-name="P4"><text:span text:style-name="T3">MySQL</text:span></text:p>
        </text:list-item>
      </text:list>
      <text:p text:style-name="P11"><text:span text:style-name="T3">Server</text:span></text:p>
      <text:list text:continue-numbering="true" text:style-name="WWNum1">
        <text:list-item>
          <text:p text:style-name="P4"><text:span text:style-name="T3">Apache (XAMPP)</text:span></text:p>
        </text:list-item>
      </text:list>
      <text:h text:style-name="P2" text:outline-level="2"><text:span text:style-name="T2">7. Database Design</text:span></text:h>
      <text:p text:style-name="P11"><text:span text:style-name="T3">Explain tables:</text:span></text:p>
      <text:list text:continue-numbering="true" text:style-name="WWNum1">
        <text:list-item>
          <text:p text:style-name="P5"><text:span text:style-name="T3">users</text:span></text:p>
        </text:list-item>
        <text:list-item>
          <text:p text:style-name="P5"><text:span text:style-name="T3">products</text:span></text:p>
        </text:list-item>
        <text:list-item>
          <text:p text:style-name="P5"><text:span text:style-name="T3">categories</text:span></text:p>
        </text:list-item>
        <text:list-item>
          <text:p text:style-name="P5"><text:span text:style-name="T3">cart</text:span></text:p>
        </text:list-item>
        <text:list-item>
          <text:p text:style-name="P5"><text:span text:style-name="T3">orders</text:span></text:p>
        </text:list-item>
        <text:list-item>
          <text:p text:style-name="P5"><text:span text:style-name="T3">order_items</text:span></text:p>
        </text:list-item>
        <text:list-item>
          <text:p text:style-name="P6"><text:span text:style-name="T3">payments</text:span></text:p>
        </text:list-item>
      </text:list>
      <text:p text:style-name="P11"><text:soft-page-break/><text:span text:style-name="T3">You can also include:</text:span></text:p>
      <text:list text:continue-numbering="true" text:style-name="WWNum1">
        <text:list-item>
          <text:p text:style-name="P5"><text:span text:style-name="T3">ER diagram</text:span></text:p>
        </text:list-item>
        <text:list-item>
          <text:p text:style-name="P6"><text:span text:style-name="T3">Relationships</text:span></text:p>
        </text:list-item>
      </text:list>
      <text:h text:style-name="P2" text:outline-level="2"><text:span text:style-name="T2">8. Development Process</text:span></text:h>
      <text:h text:style-name="P3" text:outline-level="3"><text:span text:style-name="T5">Technology Selection</text:span></text:h>
      <text:p text:style-name="P11"><text:span text:style-name="T3">Explain why you chose:</text:span></text:p>
      <text:list text:continue-numbering="true" text:style-name="WWNum1">
        <text:list-item>
          <text:p text:style-name="P5"><text:span text:style-name="T3">HTML</text:span></text:p>
        </text:list-item>
        <text:list-item>
          <text:p text:style-name="P5"><text:span text:style-name="T3">CSS</text:span></text:p>
        </text:list-item>
        <text:list-item>
          <text:p text:style-name="P5"><text:span text:style-name="T3">JavaScript</text:span></text:p>
        </text:list-item>
        <text:list-item>
          <text:p text:style-name="P5"><text:span text:style-name="T3">PHP</text:span></text:p>
        </text:list-item>
        <text:list-item>
          <text:p text:style-name="P6"><text:span text:style-name="T3">MySQL</text:span></text:p>
        </text:list-item>
      </text:list>
      <text:h text:style-name="P3" text:outline-level="3"><text:span text:style-name="T5">System Design</text:span></text:h>
      <text:list text:continue-numbering="true" text:style-name="WWNum1">
        <text:list-item>
          <text:p text:style-name="P5"><text:span text:style-name="T3">Frontend design</text:span></text:p>
        </text:list-item>
        <text:list-item>
          <text:p text:style-name="P5"><text:span text:style-name="T3">Backend design</text:span></text:p>
        </text:list-item>
        <text:list-item>
          <text:p text:style-name="P6"><text:span text:style-name="T3">Database design</text:span></text:p>
        </text:list-item>
      </text:list>
      <text:h text:style-name="P3" text:outline-level="3"><text:span text:style-name="T5">Implementation</text:span></text:h>
      <text:list text:continue-numbering="true" text:style-name="WWNum1">
        <text:list-item>
          <text:p text:style-name="P5"><text:span text:style-name="T3">Frontend development</text:span></text:p>
        </text:list-item>
        <text:list-item>
          <text:p text:style-name="P5"><text:span text:style-name="T3">Backend development</text:span></text:p>
        </text:list-item>
        <text:list-item>
          <text:p text:style-name="P6"><text:span text:style-name="T3">Database creation</text:span></text:p>
        </text:list-item>
      </text:list>
      <text:h text:style-name="P2" text:outline-level="2"><text:span text:style-name="T2">9. Testing</text:span></text:h>
      <text:p text:style-name="P11"><text:span text:style-name="T3">Explain testing types:</text:span></text:p>
      <text:list text:continue-numbering="true" text:style-name="WWNum1">
        <text:list-item>
          <text:p text:style-name="P5"><text:span text:style-name="T3">Unit testing</text:span></text:p>
        </text:list-item>
        <text:list-item>
          <text:p text:style-name="P5"><text:span text:style-name="T3">Integration testing</text:span></text:p>
        </text:list-item>
        <text:list-item>
          <text:p text:style-name="P5"><text:span text:style-name="T3">Security testing</text:span></text:p>
        </text:list-item>
        <text:list-item>
          <text:p text:style-name="P6"><text:span text:style-name="T3">User testing</text:span></text:p>
        </text:list-item>
      </text:list>
      <text:h text:style-name="P2" text:outline-level="2"><text:span text:style-name="T2">10. Security</text:span></text:h>
      <text:p text:style-name="P11"><text:span text:style-name="T3">Explain security practices:</text:span></text:p>
      <text:list text:continue-numbering="true" text:style-name="WWNum1">
        <text:list-item>
          <text:p text:style-name="P5"><text:span text:style-name="T3">Password hashing (bcrypt)</text:span></text:p>
        </text:list-item>
        <text:list-item>
          <text:p text:style-name="P5"><text:span text:style-name="T3">Prepared statements</text:span></text:p>
        </text:list-item>
        <text:list-item>
          <text:p text:style-name="P5"><text:span text:style-name="T3">CSRF protection</text:span></text:p>
        </text:list-item>
        <text:list-item>
          <text:p text:style-name="P5"><text:span text:style-name="T3">XSS protection</text:span></text:p>
        </text:list-item>
        <text:list-item>
          <text:p text:style-name="P6"><text:soft-page-break/><text:span text:style-name="T3">Role-based access</text:span></text:p>
        </text:list-item>
      </text:list>
      <text:h text:style-name="P2" text:outline-level="2"><text:span text:style-name="T2">11. Deployment</text:span></text:h>
      <text:p text:style-name="P11"><text:span text:style-name="T3">Explain how to run the system:</text:span></text:p>
      <text:list text:continue-numbering="true" text:style-name="WWNum1">
        <text:list-item>
          <text:p text:style-name="P5"><text:span text:style-name="T3">Upload files to server</text:span></text:p>
        </text:list-item>
        <text:list-item>
          <text:p text:style-name="P5"><text:span text:style-name="T3">Import database</text:span></text:p>
        </text:list-item>
        <text:list-item>
          <text:p text:style-name="P6"><text:span text:style-name="T3">Configure connection</text:span></text:p>
        </text:list-item>
      </text:list>
      <text:h text:style-name="P2" text:outline-level="2"><text:span text:style-name="T2">12. How to Use the Platform</text:span></text:h>
      <text:h text:style-name="P3" text:outline-level="3"><text:span text:style-name="T5">Customer</text:span></text:h>
      <text:list text:style-name="WWNum2">
        <text:list-item>
          <text:p text:style-name="P7"><text:span text:style-name="T3">Register</text:span></text:p>
        </text:list-item>
        <text:list-item>
          <text:p text:style-name="P7"><text:span text:style-name="T3">Login</text:span></text:p>
        </text:list-item>
        <text:list-item>
          <text:p text:style-name="P7"><text:span text:style-name="T3">Browse products</text:span></text:p>
        </text:list-item>
        <text:list-item>
          <text:p text:style-name="P7"><text:span text:style-name="T3">Add to cart</text:span></text:p>
        </text:list-item>
        <text:list-item>
          <text:p text:style-name="P8"><text:span text:style-name="T3">Checkout</text:span></text:p>
        </text:list-item>
      </text:list>
      <text:h text:style-name="P3" text:outline-level="3"><text:span text:style-name="T5">Admin</text:span></text:h>
      <text:list text:continue-numbering="true" text:style-name="WWNum2">
        <text:list-item>
          <text:p text:style-name="P7"><text:span text:style-name="T3">Login to admin panel</text:span></text:p>
        </text:list-item>
        <text:list-item>
          <text:p text:style-name="P7"><text:span text:style-name="T3">Manage products</text:span></text:p>
        </text:list-item>
        <text:list-item>
          <text:p text:style-name="P8"><text:span text:style-name="T3">Monitor orders</text:span></text:p>
        </text:list-item>
      </text:list>
      <text:h text:style-name="P2" text:outline-level="2"><text:span text:style-name="T2">13. Future Enhancements</text:span></text:h>
      <text:p text:style-name="P11"><text:span text:style-name="T3">Example:</text:span></text:p>
      <text:list text:style-name="WWNum3">
        <text:list-item>
          <text:p text:style-name="P9"><text:span text:style-name="T3">Local language support</text:span></text:p>
        </text:list-item>
        <text:list-item>
          <text:p text:style-name="P9"><text:span text:style-name="T3">AI assistant</text:span></text:p>
        </text:list-item>
        <text:list-item>
          <text:p text:style-name="P9"><text:span text:style-name="T3">Mobile app</text:span></text:p>
        </text:list-item>
        <text:list-item>
          <text:p text:style-name="P9"><text:span text:style-name="T3">Payment gateway</text:span></text:p>
        </text:list-item>
        <text:list-item>
          <text:p text:style-name="P9"><text:span text:style-name="T3">Product reviews</text:span></text:p>
        </text:list-item>
        <text:list-item>
          <text:p text:style-name="P10"><text:span text:style-name="T3">Seller portal</text:span></text:p>
        </text:list-item>
      </text:list>
      <text:h text:style-name="P2" text:outline-level="2"><text:span text:style-name="T2">14. Conclusion</text:span></text:h>
      <text:p text:style-name="P11" loext:marker-style-name="T4"><text:span text:style-name="T3">Explain the impact of SmartMall and its scalability.</text:span><text:span text:style-name="T4"><text:line-break/><text:line-break/><text:line-break/><text:line-break/><text:line-break/>Google Sign-In</text:span></text:p>
      <text:p text:style-name="Text_20_body"><text:soft-page-break/>Required materials:</text:p>
      <text:list text:style-name="L1">
        <text:list-item>
          <text:p text:style-name="P13">Google OAuth configuration screenshot </text:p>
        </text:list-item>
        <text:list-item>
          <text:p text:style-name="P13">Google Cloud Console configuration screenshot </text:p>
        </text:list-item>
        <text:list-item>
          <text:p text:style-name="P13">Login flow screenshot </text:p>
        </text:list-item>
        <text:list-item>
          <text:p text:style-name="P13">Database user creation proof </text:p>
        </text:list-item>
        <text:list-item>
          <text:p text:style-name="P12">Mobile Google Sign-In proof (if implemented) </text:p>
        </text:list-item>
      </text:list>
      <text:p text:style-name="Horizontal_20_Line"/>
      <text:h text:style-name="Heading_20_1" text:outline-level="1">User Management</text:h>
      <text:p text:style-name="Text_20_body">Required materials:</text:p>
      <text:list text:style-name="L2">
        <text:list-item>
          <text:p text:style-name="P15">User management page screenshot </text:p>
        </text:list-item>
        <text:list-item>
          <text:p text:style-name="P15">User list screenshot </text:p>
        </text:list-item>
        <text:list-item>
          <text:p text:style-name="P15">User search screenshot </text:p>
        </text:list-item>
        <text:list-item>
          <text:p text:style-name="P15">Database table screenshot </text:p>
        </text:list-item>
        <text:list-item>
          <text:p text:style-name="P14">CRUD workflow screenshot </text:p>
        </text:list-item>
      </text:list>
      <text:p text:style-name="Horizontal_20_Line"/>
      <text:h text:style-name="Heading_20_1" text:outline-level="1">Admin Promotion/Demotion</text:h>
      <text:p text:style-name="Text_20_body">Required materials:</text:p>
      <text:list text:style-name="L3">
        <text:list-item>
          <text:p text:style-name="P17">Admin management page screenshot </text:p>
        </text:list-item>
        <text:list-item>
          <text:p text:style-name="P17">Promote admin screenshot </text:p>
        </text:list-item>
        <text:list-item>
          <text:p text:style-name="P17">Demote admin screenshot </text:p>
        </text:list-item>
        <text:list-item>
          <text:p text:style-name="P17">Email confirmation screenshot </text:p>
        </text:list-item>
        <text:list-item>
          <text:p text:style-name="P16">Database role update proof </text:p>
        </text:list-item>
      </text:list>
      <text:p text:style-name="Horizontal_20_Line"/>
      <text:h text:style-name="Heading_20_1" text:outline-level="1">Live Search</text:h>
      <text:p text:style-name="Text_20_body">Required materials:</text:p>
      <text:list text:style-name="L4">
        <text:list-item>
          <text:p text:style-name="P19">Search UI screenshot </text:p>
        </text:list-item>
        <text:list-item>
          <text:p text:style-name="P19">Search results screenshot </text:p>
        </text:list-item>
        <text:list-item>
          <text:p text:style-name="P19">Search API code snippet </text:p>
        </text:list-item>
        <text:list-item>
          <text:p text:style-name="P19">Database query example </text:p>
        </text:list-item>
        <text:list-item>
          <text:p text:style-name="P18">Mobile search screenshot </text:p>
        </text:list-item>
      </text:list>
      <text:p text:style-name="Horizontal_20_Line"/>
      <text:h text:style-name="Heading_20_1" text:outline-level="1">Real-Time Reports &amp; Analytics</text:h>
      <text:p text:style-name="Text_20_body">Required materials:</text:p>
      <text:list text:style-name="L5">
        <text:list-item>
          <text:p text:style-name="P21"><text:soft-page-break/>Analytics dashboard screenshot </text:p>
        </text:list-item>
        <text:list-item>
          <text:p text:style-name="P21">Revenue report screenshot </text:p>
        </text:list-item>
        <text:list-item>
          <text:p text:style-name="P21">User statistics screenshot </text:p>
        </text:list-item>
        <text:list-item>
          <text:p text:style-name="P21">Order statistics screenshot </text:p>
        </text:list-item>
        <text:list-item>
          <text:p text:style-name="P20">Product statistics screenshot </text:p>
        </text:list-item>
      </text:list>
      <text:p text:style-name="Horizontal_20_Line"/>
      <text:h text:style-name="Heading_20_1" text:outline-level="1">Charts &amp; Graphs</text:h>
      <text:p text:style-name="Text_20_body">Required materials:</text:p>
      <text:list text:style-name="L6">
        <text:list-item>
          <text:p text:style-name="P23">Sales chart screenshot </text:p>
        </text:list-item>
        <text:list-item>
          <text:p text:style-name="P23">Revenue chart screenshot </text:p>
        </text:list-item>
        <text:list-item>
          <text:p text:style-name="P23">User growth chart screenshot </text:p>
        </text:list-item>
        <text:list-item>
          <text:p text:style-name="P23">Order trend chart screenshot </text:p>
        </text:list-item>
        <text:list-item>
          <text:p text:style-name="P22">Chart library information </text:p>
        </text:list-item>
      </text:list>
      <text:p text:style-name="Horizontal_20_Line"/>
      <text:h text:style-name="Heading_20_1" text:outline-level="1">Cloudflare Web Analytics</text:h>
      <text:p text:style-name="Text_20_body">Required materials:</text:p>
      <text:list text:style-name="L7">
        <text:list-item>
          <text:p text:style-name="P25">Cloudflare Analytics dashboard screenshot </text:p>
        </text:list-item>
        <text:list-item>
          <text:p text:style-name="P25">Visitor statistics screenshot </text:p>
        </text:list-item>
        <text:list-item>
          <text:p text:style-name="P25">Traffic analytics screenshot </text:p>
        </text:list-item>
        <text:list-item>
          <text:p text:style-name="P25">Device analytics screenshot </text:p>
        </text:list-item>
        <text:list-item>
          <text:p text:style-name="P24">Performance metrics screenshot </text:p>
        </text:list-item>
      </text:list>
      <text:p text:style-name="Horizontal_20_Line"/>
      <text:h text:style-name="Heading_20_1" text:outline-level="1">Google reCAPTCHA</text:h>
      <text:p text:style-name="Text_20_body">Required materials:</text:p>
      <text:list text:style-name="L8">
        <text:list-item>
          <text:p text:style-name="P27">reCAPTCHA configuration screenshot </text:p>
        </text:list-item>
        <text:list-item>
          <text:p text:style-name="P27">Registration form screenshot </text:p>
        </text:list-item>
        <text:list-item>
          <text:p text:style-name="P27">Login form screenshot </text:p>
        </text:list-item>
        <text:list-item>
          <text:p text:style-name="P27">Contact form screenshot </text:p>
        </text:list-item>
        <text:list-item>
          <text:p text:style-name="P26">Security workflow explanation </text:p>
        </text:list-item>
      </text:list>
      <text:p text:style-name="Horizontal_20_Line"/>
      <text:h text:style-name="Heading_20_1" text:outline-level="1">SMTP Email Service</text:h>
      <text:p text:style-name="Text_20_body">Required materials:</text:p>
      <text:list text:style-name="L9">
        <text:list-item>
          <text:p text:style-name="P29">SMTP configuration screenshot </text:p>
        </text:list-item>
        <text:list-item>
          <text:p text:style-name="P29"><text:soft-page-break/>Mail provider information </text:p>
        </text:list-item>
        <text:list-item>
          <text:p text:style-name="P29">Email sending workflow </text:p>
        </text:list-item>
        <text:list-item>
          <text:p text:style-name="P28">Test email screenshot </text:p>
        </text:list-item>
      </text:list>
      <text:p text:style-name="Horizontal_20_Line"/>
      <text:h text:style-name="Heading_20_1" text:outline-level="1">Email Verification</text:h>
      <text:p text:style-name="Text_20_body">Required materials:</text:p>
      <text:list text:style-name="L10">
        <text:list-item>
          <text:p text:style-name="P31">Verification email screenshot </text:p>
        </text:list-item>
        <text:list-item>
          <text:p text:style-name="P31">Verification page screenshot </text:p>
        </text:list-item>
        <text:list-item>
          <text:p text:style-name="P31">Database verification field proof </text:p>
        </text:list-item>
        <text:list-item>
          <text:p text:style-name="P30">Verification workflow diagram </text:p>
        </text:list-item>
      </text:list>
      <text:p text:style-name="Horizontal_20_Line"/>
      <text:h text:style-name="Heading_20_1" text:outline-level="1">Password Reset</text:h>
      <text:p text:style-name="Text_20_body">Required materials:</text:p>
      <text:list text:style-name="L11">
        <text:list-item>
          <text:p text:style-name="P33">Forgot password page screenshot </text:p>
        </text:list-item>
        <text:list-item>
          <text:p text:style-name="P33">Reset email screenshot </text:p>
        </text:list-item>
        <text:list-item>
          <text:p text:style-name="P33">Reset password page screenshot </text:p>
        </text:list-item>
        <text:list-item>
          <text:p text:style-name="P32">Token verification workflow </text:p>
        </text:list-item>
      </text:list>
      <text:p text:style-name="Horizontal_20_Line"/>
      <text:h text:style-name="Heading_20_1" text:outline-level="1">Contact Form</text:h>
      <text:p text:style-name="Text_20_body">Required materials:</text:p>
      <text:list text:style-name="L12">
        <text:list-item>
          <text:p text:style-name="P35">Contact page screenshot </text:p>
        </text:list-item>
        <text:list-item>
          <text:p text:style-name="P35">Form submission screenshot </text:p>
        </text:list-item>
        <text:list-item>
          <text:p text:style-name="P35">Email delivery proof </text:p>
        </text:list-item>
        <text:list-item>
          <text:p text:style-name="P34">Admin receiving email proof </text:p>
        </text:list-item>
      </text:list>
      <text:p text:style-name="Horizontal_20_Line"/>
      <text:h text:style-name="Heading_20_1" text:outline-level="1">Push Notifications</text:h>
      <text:p text:style-name="Text_20_body">Required materials:</text:p>
      <text:list text:style-name="L13">
        <text:list-item>
          <text:p text:style-name="P37">Notification configuration screenshot </text:p>
        </text:list-item>
        <text:list-item>
          <text:p text:style-name="P37">Notification example screenshot </text:p>
        </text:list-item>
        <text:list-item>
          <text:p text:style-name="P37">Notification workflow diagram </text:p>
        </text:list-item>
        <text:list-item>
          <text:p text:style-name="P36">Mobile notification screenshot (if available) </text:p>
        </text:list-item>
      </text:list>
      <text:p text:style-name="Horizontal_20_Line"/>
      <text:h text:style-name="Heading_20_1" text:outline-level="1"><text:soft-page-break/>Order Notifications</text:h>
      <text:p text:style-name="Text_20_body">Required materials:</text:p>
      <text:list text:style-name="L14">
        <text:list-item>
          <text:p text:style-name="P39">New order notification screenshot </text:p>
        </text:list-item>
        <text:list-item>
          <text:p text:style-name="P39">Admin notification screenshot </text:p>
        </text:list-item>
        <text:list-item>
          <text:p text:style-name="P38">Order status notification screenshot </text:p>
        </text:list-item>
      </text:list>
      <text:p text:style-name="Horizontal_20_Line"/>
      <text:h text:style-name="Heading_20_1" text:outline-level="1">Support Notifications</text:h>
      <text:p text:style-name="Text_20_body">Required materials:</text:p>
      <text:list text:style-name="L15">
        <text:list-item>
          <text:p text:style-name="P41">Support request screenshot </text:p>
        </text:list-item>
        <text:list-item>
          <text:p text:style-name="P41">Admin alert screenshot </text:p>
        </text:list-item>
        <text:list-item>
          <text:p text:style-name="P40">Notification workflow screenshot </text:p>
        </text:list-item>
      </text:list>
      <text:p text:style-name="Horizontal_20_Line"/>
      <text:h text:style-name="Heading_20_1" text:outline-level="1">Authentication System</text:h>
      <text:p text:style-name="Text_20_body">Required materials:</text:p>
      <text:list text:style-name="L16">
        <text:list-item>
          <text:p text:style-name="P43">Registration page screenshot </text:p>
        </text:list-item>
        <text:list-item>
          <text:p text:style-name="P43">Login page screenshot </text:p>
        </text:list-item>
        <text:list-item>
          <text:p text:style-name="P43">Logout workflow </text:p>
        </text:list-item>
        <text:list-item>
          <text:p text:style-name="P43">Authentication flow diagram </text:p>
        </text:list-item>
        <text:list-item>
          <text:p text:style-name="P42">Database user table proof </text:p>
        </text:list-item>
      </text:list>
      <text:p text:style-name="Horizontal_20_Line"/>
      <text:h text:style-name="Heading_20_1" text:outline-level="1">Product Management</text:h>
      <text:p text:style-name="Text_20_body">Required materials:</text:p>
      <text:list text:style-name="L17">
        <text:list-item>
          <text:p text:style-name="P45">Product list screenshot </text:p>
        </text:list-item>
        <text:list-item>
          <text:p text:style-name="P45">Add product screenshot </text:p>
        </text:list-item>
        <text:list-item>
          <text:p text:style-name="P45">Edit product screenshot </text:p>
        </text:list-item>
        <text:list-item>
          <text:p text:style-name="P45">Delete product screenshot </text:p>
        </text:list-item>
        <text:list-item>
          <text:p text:style-name="P44">Product database structure </text:p>
        </text:list-item>
      </text:list>
      <text:p text:style-name="Horizontal_20_Line"/>
      <text:h text:style-name="Heading_20_1" text:outline-level="1">Category Management</text:h>
      <text:p text:style-name="Text_20_body">Required materials:</text:p>
      <text:list text:style-name="L18">
        <text:list-item>
          <text:p text:style-name="P47">Category list screenshot </text:p>
        </text:list-item>
        <text:list-item>
          <text:p text:style-name="P47"><text:soft-page-break/>Add category screenshot </text:p>
        </text:list-item>
        <text:list-item>
          <text:p text:style-name="P47">Edit category screenshot </text:p>
        </text:list-item>
        <text:list-item>
          <text:p text:style-name="P46">Database category table proof </text:p>
        </text:list-item>
      </text:list>
      <text:p text:style-name="Horizontal_20_Line"/>
      <text:h text:style-name="Heading_20_1" text:outline-level="1">Shopping Cart</text:h>
      <text:p text:style-name="Text_20_body">Required materials:</text:p>
      <text:list text:style-name="L19">
        <text:list-item>
          <text:p text:style-name="P49">Cart page screenshot </text:p>
        </text:list-item>
        <text:list-item>
          <text:p text:style-name="P49">Add to cart workflow </text:p>
        </text:list-item>
        <text:list-item>
          <text:p text:style-name="P49">Update quantity screenshot </text:p>
        </text:list-item>
        <text:list-item>
          <text:p text:style-name="P48">Remove item screenshot </text:p>
        </text:list-item>
      </text:list>
      <text:p text:style-name="Horizontal_20_Line"/>
      <text:h text:style-name="Heading_20_1" text:outline-level="1">Checkout System</text:h>
      <text:p text:style-name="Text_20_body">Required materials:</text:p>
      <text:list text:style-name="L20">
        <text:list-item>
          <text:p text:style-name="P51">Checkout page screenshot </text:p>
        </text:list-item>
        <text:list-item>
          <text:p text:style-name="P51">Checkout workflow diagram </text:p>
        </text:list-item>
        <text:list-item>
          <text:p text:style-name="P51">Order creation proof </text:p>
        </text:list-item>
        <text:list-item>
          <text:p text:style-name="P50">Database order record proof </text:p>
        </text:list-item>
      </text:list>
      <text:p text:style-name="Horizontal_20_Line"/>
      <text:h text:style-name="Heading_20_1" text:outline-level="1">Chapa Payment Gateway</text:h>
      <text:p text:style-name="Text_20_body">Required materials:</text:p>
      <text:list text:style-name="L21">
        <text:list-item>
          <text:p text:style-name="P53">Payment page screenshot </text:p>
        </text:list-item>
        <text:list-item>
          <text:p text:style-name="P53">Chapa integration code snippet </text:p>
        </text:list-item>
        <text:list-item>
          <text:p text:style-name="P53">Successful payment screenshot </text:p>
        </text:list-item>
        <text:list-item>
          <text:p text:style-name="P53">Failed payment screenshot </text:p>
        </text:list-item>
        <text:list-item>
          <text:p text:style-name="P52">Verification workflow diagram </text:p>
        </text:list-item>
      </text:list>
      <text:p text:style-name="Horizontal_20_Line"/>
      <text:h text:style-name="Heading_20_1" text:outline-level="1">Order Management</text:h>
      <text:p text:style-name="Text_20_body">Required materials:</text:p>
      <text:list text:style-name="L22">
        <text:list-item>
          <text:p text:style-name="P55">Order list screenshot </text:p>
        </text:list-item>
        <text:list-item>
          <text:p text:style-name="P55">Order details screenshot </text:p>
        </text:list-item>
        <text:list-item>
          <text:p text:style-name="P55">Order status update screenshot </text:p>
        </text:list-item>
        <text:list-item>
          <text:p text:style-name="P54">Database order records </text:p>
        </text:list-item>
      </text:list>
      <text:p text:style-name="Horizontal_20_Line"/>
      <text:h text:style-name="Heading_20_1" text:outline-level="1"><text:soft-page-break/>Mobile Application</text:h>
      <text:p text:style-name="Text_20_body">Required materials:</text:p>
      <text:list text:style-name="L23">
        <text:list-item>
          <text:p text:style-name="P57">Mobile home screenshot </text:p>
        </text:list-item>
        <text:list-item>
          <text:p text:style-name="P57">Mobile product screenshot </text:p>
        </text:list-item>
        <text:list-item>
          <text:p text:style-name="P57">Mobile cart screenshot </text:p>
        </text:list-item>
        <text:list-item>
          <text:p text:style-name="P57">Mobile checkout screenshot </text:p>
        </text:list-item>
        <text:list-item>
          <text:p text:style-name="P56">Mobile payment screenshot </text:p>
        </text:list-item>
      </text:list>
      <text:p text:style-name="Horizontal_20_Line"/>
      <text:h text:style-name="Heading_20_1" text:outline-level="1">Capacitor</text:h>
      <text:p text:style-name="Text_20_body">Required materials:</text:p>
      <text:list text:style-name="L24">
        <text:list-item>
          <text:p text:style-name="P59">capacitor.config file </text:p>
        </text:list-item>
        <text:list-item>
          <text:p text:style-name="P59">Build configuration screenshot </text:p>
        </text:list-item>
        <text:list-item>
          <text:p text:style-name="P58">Project structure screenshot </text:p>
        </text:list-item>
      </text:list>
      <text:p text:style-name="Horizontal_20_Line"/>
      <text:h text:style-name="Heading_20_1" text:outline-level="1">Android Studio</text:h>
      <text:p text:style-name="Text_20_body">Required materials:</text:p>
      <text:list text:style-name="L25">
        <text:list-item>
          <text:p text:style-name="P61">Emulator screenshot </text:p>
        </text:list-item>
        <text:list-item>
          <text:p text:style-name="P61">APK build screenshot </text:p>
        </text:list-item>
        <text:list-item>
          <text:p text:style-name="P60">Device testing screenshot </text:p>
        </text:list-item>
      </text:list>
      <text:p text:style-name="Horizontal_20_Line"/>
      <text:h text:style-name="Heading_20_1" text:outline-level="1">Security System</text:h>
      <text:p text:style-name="Text_20_body">Required materials:</text:p>
      <text:list text:style-name="L26">
        <text:list-item>
          <text:p text:style-name="P63">Password hashing proof </text:p>
        </text:list-item>
        <text:list-item>
          <text:p text:style-name="P63">Prepared statement proof </text:p>
        </text:list-item>
        <text:list-item>
          <text:p text:style-name="P63">CSRF implementation proof </text:p>
        </text:list-item>
        <text:list-item>
          <text:p text:style-name="P63">XSS protection proof </text:p>
        </text:list-item>
        <text:list-item>
          <text:p text:style-name="P62">Session security proof </text:p>
        </text:list-item>
      </text:list>
      <text:p text:style-name="Horizontal_20_Line"/>
      <text:h text:style-name="Heading_20_1" text:outline-level="1">Database System</text:h>
      <text:p text:style-name="Text_20_body">Required materials:</text:p>
      <text:list text:style-name="L27">
        <text:list-item>
          <text:p text:style-name="P65">ER Diagram </text:p>
        </text:list-item>
        <text:list-item>
          <text:p text:style-name="P65"><text:soft-page-break/>Database schema </text:p>
        </text:list-item>
        <text:list-item>
          <text:p text:style-name="P65">Table structure screenshots </text:p>
        </text:list-item>
        <text:list-item>
          <text:p text:style-name="P65">Relationship diagram </text:p>
        </text:list-item>
        <text:list-item>
          <text:p text:style-name="P64">SQL scripts </text:p>
        </text:list-item>
      </text:list>
      <text:p text:style-name="Horizontal_20_Line"/>
      <text:h text:style-name="Heading_20_1" text:outline-level="1">API System</text:h>
      <text:p text:style-name="Text_20_body">Required materials:</text:p>
      <text:list text:style-name="L28">
        <text:list-item>
          <text:p text:style-name="P67">Endpoint list </text:p>
        </text:list-item>
        <text:list-item>
          <text:p text:style-name="P67">Request examples </text:p>
        </text:list-item>
        <text:list-item>
          <text:p text:style-name="P67">Response examples </text:p>
        </text:list-item>
        <text:list-item>
          <text:p text:style-name="P66">API workflow diagrams </text:p>
        </text:list-item>
      </text:list>
      <text:p text:style-name="Horizontal_20_Line"/>
      <text:h text:style-name="Heading_20_1" text:outline-level="1">XAMPP Development Environment</text:h>
      <text:p text:style-name="Text_20_body">Required materials:</text:p>
      <text:list text:style-name="L29">
        <text:list-item>
          <text:p text:style-name="P69">XAMPP dashboard screenshot </text:p>
        </text:list-item>
        <text:list-item>
          <text:p text:style-name="P69">phpMyAdmin screenshot </text:p>
        </text:list-item>
        <text:list-item>
          <text:p text:style-name="P68">Localhost running screenshot </text:p>
        </text:list-item>
      </text:list>
      <text:p text:style-name="Horizontal_20_Line"/>
      <text:h text:style-name="Heading_20_1" text:outline-level="1">ProFreeHost Deployment</text:h>
      <text:p text:style-name="Text_20_body">Required materials:</text:p>
      <text:list text:style-name="L30">
        <text:list-item>
          <text:p text:style-name="P71">Hosting dashboard screenshot </text:p>
        </text:list-item>
        <text:list-item>
          <text:p text:style-name="P71">File manager screenshot </text:p>
        </text:list-item>
        <text:list-item>
          <text:p text:style-name="P71">Database configuration screenshot </text:p>
        </text:list-item>
        <text:list-item>
          <text:p text:style-name="P70">Live website screenshot </text:p>
        </text:list-item>
      </text:list>
      <text:p text:style-name="Text_20_body">This is the kind of checklist I would keep while writing SmartMall documentation. For every implemented component, collect:</text:p>
      <text:list text:style-name="L31">
        <text:list-item>
          <text:p text:style-name="P73">Screenshot evidence </text:p>
        </text:list-item>
        <text:list-item>
          <text:p text:style-name="P73">Configuration evidence </text:p>
        </text:list-item>
        <text:list-item>
          <text:p text:style-name="P73">Workflow/diagram evidence </text:p>
        </text:list-item>
        <text:list-item>
          <text:p text:style-name="P73">Database/API proof (if applicable) </text:p>
        </text:list-item>
        <text:list-item>
          <text:p text:style-name="P72">Brief explanation later</text:p>
        </text:list-item>
      </text:list>
      <text:p text:style-name="P11" loext:marker-style-name="T4"><text:span text:style-name="T4"/></text:p>
      <text:p text:style-name="P11"/>
      <text:p text:style-name="P11"><text:soft-page-break/><text:span text:style-name="T6">use all you have documentation and integrate into my platform have so many document in my project check full path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rial" fo:font-family="Arial" style:font-family-generic="roman" style:font-pitch="variable" fo:font-size="28pt" fo:letter-spacing="-0.0071in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39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top="0in" fo:margin-bottom="0.0693in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top="0in" fo:margin-bottom="0.0693in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top="0in" fo:margin-bottom="0.0693in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top="0in" fo:margin-bottom="0.0693in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top="0in" fo:margin-bottom="0.0693in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top="0in" fo:margin-bottom="0.0693in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top="0in" fo:margin-bottom="0.0693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0071in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is-legal="true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1" loext:is-legal="true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2" loext:is-legal="true" loext:num-list-format="%3%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1.4925in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4" loext:is-legal="true" loext:num-list-format="%5%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5" loext:is-legal="true" loext:num-list-format="%6%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2.9925in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" loext:is-legal="true" loext:num-list-format="%8%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" loext:is-legal="true" loext:num-list-format="%9%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ListLabel_20_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2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2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dc:date>2026-06-02T18:37:07.132470634</dc:date>
    <meta:generator>LibreOffice/24.2.7.2$Linux_X86_64 LibreOffice_project/420$Build-2</meta:generator>
    <meta:editing-duration>PT4M10S</meta:editing-duration>
    <meta:document-statistic meta:table-count="0" meta:image-count="0" meta:object-count="0" meta:page-count="12" meta:paragraph-count="310" meta:word-count="1057" meta:character-count="6977" meta:non-whitespace-character-count="6301"/>
    <meta:template xlink:type="simple" xlink:actuate="onRequest" xlink:title="Normal.dotm" xlink:href=""/>
  </office:meta>
</office:document-meta>
</file>